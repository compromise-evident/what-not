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3" manifest:media-type="application/vnd.oasis.opendocument.spreadshee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Extra Bold" svg:font-family="'Cantarell Extra Bold'"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MathJax_Math" svg:font-family="MathJax_Math" style:font-pitch="variable"/>
    <style:font-face style:name="MathJax_SansSerif" svg:font-family="MathJax_SansSerif" style:font-family-generic="swiss" style:font-pitch="variable"/>
    <style:font-face style:name="Noto Sans Mono" svg:font-family="'Noto Sans Mono'" style:font-family-generic="swiss" style:font-pitch="fixed"/>
    <style:font-face style:name="Noto Sans Mono1" svg:font-family="'Noto Sans Mono'" style:font-family-generic="swiss" style:font-pitch="variable"/>
  </office:font-face-decls>
  <office:automatic-styles>
    <style:style style:name="P1" style:family="paragraph" style:parent-style-name="Standard">
      <style:paragraph-properties fo:text-align="center" style:justify-single-word="false"/>
      <style:text-properties style:font-name="MathJax_SansSerif" fo:font-size="10.5pt" fo:font-weight="bold" officeooo:rsid="0000b10f" officeooo:paragraph-rsid="001c3beb"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MathJax_SansSerif" fo:font-size="7pt" style:text-underline-style="none" fo:font-weight="bold" officeooo:rsid="0000b10f" officeooo:paragraph-rsid="001c3beb" style:font-size-asian="7pt" style:font-weight-asian="bold" style:font-size-complex="7pt" style:font-weight-complex="bold"/>
    </style:style>
    <style:style style:name="P3" style:family="paragraph" style:parent-style-name="Standard">
      <style:paragraph-properties fo:text-align="center" style:justify-single-word="false"/>
      <style:text-properties style:font-name="MathJax_SansSerif" fo:font-size="8pt" style:text-underline-style="none" fo:font-weight="bold" officeooo:rsid="001c3beb" officeooo:paragraph-rsid="001c3beb" style:font-size-asian="8pt" style:font-weight-asian="bold" style:font-size-complex="8pt" style:font-weight-complex="bold"/>
    </style:style>
    <style:style style:name="P4" style:family="paragraph" style:parent-style-name="Standard">
      <style:paragraph-properties fo:text-align="center" style:justify-single-word="false"/>
      <style:text-properties style:font-name="MathJax_SansSerif" fo:font-size="8pt" style:text-underline-style="none" fo:font-weight="bold" officeooo:rsid="001c3beb" officeooo:paragraph-rsid="003d65e4" style:font-size-asian="8pt" style:font-weight-asian="bold" style:font-size-complex="8pt" style:font-weight-complex="bold"/>
    </style:style>
    <style:style style:name="P5" style:family="paragraph" style:parent-style-name="Standard">
      <style:paragraph-properties fo:text-align="justify" style:justify-single-word="false"/>
      <style:text-properties fo:font-size="8pt" style:text-underline-style="none" fo:font-weight="normal" officeooo:rsid="00243e28" officeooo:paragraph-rsid="003efb92" style:font-size-asian="8pt" style:font-weight-asian="normal" style:font-size-complex="8pt" style:font-weight-complex="normal"/>
    </style:style>
    <style:style style:name="P6" style:family="paragraph" style:parent-style-name="Standard">
      <style:paragraph-properties fo:text-align="center" style:justify-single-word="false"/>
      <style:text-properties style:font-name="Liberation Serif" fo:font-size="8pt" style:text-underline-style="none" fo:font-weight="normal" officeooo:rsid="002f48ef" officeooo:paragraph-rsid="003efb92" style:font-name-asian="Liberation Serif" style:font-size-asian="8pt" style:font-weight-asian="normal" style:font-name-complex="Liberation Serif" style:font-size-complex="8pt" style:font-weight-complex="normal"/>
    </style:style>
    <style:style style:name="P7" style:family="paragraph" style:parent-style-name="Standard">
      <style:paragraph-properties fo:text-align="center" style:justify-single-word="false"/>
      <style:text-properties style:font-name="MathJax_Math" fo:font-size="8pt" style:text-underline-style="none" fo:font-weight="normal" officeooo:rsid="002f48ef" officeooo:paragraph-rsid="003efb92" style:font-name-asian="Liberation Serif" style:font-size-asian="8pt" style:font-weight-asian="normal" style:font-name-complex="Liberation Serif" style:font-size-complex="8pt" style:font-weight-complex="normal"/>
    </style:style>
    <style:style style:name="P8" style:family="paragraph" style:parent-style-name="Standard">
      <style:paragraph-properties fo:text-align="center" style:justify-single-word="false"/>
      <style:text-properties fo:color="#cccccc" loext:opacity="100%" style:font-name="Cantarell Extra Bold" fo:font-size="7pt" fo:font-style="normal" style:text-underline-style="none" fo:font-weight="bold" officeooo:rsid="000a4bda" officeooo:paragraph-rsid="0043d019" style:font-name-asian="Liberation Serif" style:font-size-asian="7pt" style:font-style-asian="normal" style:font-weight-asian="bold" style:font-name-complex="Liberation Serif" style:font-size-complex="7pt" style:font-style-complex="normal" style:font-weight-complex="bold"/>
    </style:style>
    <style:style style:name="P9" style:family="paragraph" style:parent-style-name="Standard">
      <style:paragraph-properties fo:text-align="center" style:justify-single-word="false"/>
      <style:text-properties fo:color="#cccccc" loext:opacity="100%" style:font-name="Cantarell Extra Bold" fo:font-size="7pt" fo:font-style="normal" style:text-underline-style="none" fo:font-weight="bold" officeooo:rsid="00120412" officeooo:paragraph-rsid="003efb92" style:font-name-asian="Liberation Serif" style:font-size-asian="7pt" style:font-style-asian="normal" style:font-weight-asian="bold" style:font-name-complex="Liberation Serif" style:font-size-complex="7pt" style:font-style-complex="normal" style:font-weight-complex="bold"/>
    </style:style>
    <style:style style:name="P10" style:family="paragraph">
      <style:paragraph-properties fo:text-align="justify"/>
    </style:style>
    <style:style style:name="P11" style:family="paragraph">
      <loext:graphic-properties draw:fill="none" draw:fill-color="#ffffff"/>
      <style:paragraph-properties fo:text-align="justify" style:writing-mode="lr-tb"/>
      <style:text-properties style:font-name="Noto Sans Mono" fo:font-size="7pt" fo:font-weight="normal" style:font-size-asian="7pt" style:font-weight-asian="normal" style:font-size-complex="7pt" style:font-weight-complex="normal"/>
    </style:style>
    <style:style style:name="P12" style:family="paragraph">
      <loext:graphic-properties draw:fill="none" draw:fill-color="#000000"/>
    </style:style>
    <style:style style:name="P13" style:family="paragraph">
      <loext:graphic-properties draw:fill="none" draw:fill-color="#ffffff"/>
      <style:paragraph-properties style:writing-mode="lr-tb"/>
      <style:text-properties style:font-name="MathJax_SansSerif" fo:font-size="8pt" fo:font-style="italic" fo:font-weight="normal" style:font-size-asian="8pt" style:font-style-asian="italic" style:font-weight-asian="normal" style:font-size-complex="8pt" style:font-style-complex="italic" style:font-weight-complex="normal"/>
    </style:style>
    <style:style style:name="P14" style:family="paragraph">
      <loext:graphic-properties draw:fill="none" draw:fill-color="#ffffff"/>
      <style:paragraph-properties style:writing-mode="lr-tb"/>
      <style:text-properties style:font-name="MathJax_SansSerif" fo:font-size="8pt" fo:font-style="italic" style:font-size-asian="8pt" style:font-style-asian="italic" style:font-size-complex="8pt" style:font-style-complex="italic"/>
    </style:style>
    <style:style style:name="T1" style:family="text">
      <style:text-properties officeooo:rsid="003d65e4"/>
    </style:style>
    <style:style style:name="T2" style:family="text">
      <style:text-properties officeooo:rsid="00286e76"/>
    </style:style>
    <style:style style:name="T3" style:family="text">
      <style:text-properties officeooo:rsid="002a58a6"/>
    </style:style>
    <style:style style:name="T4" style:family="text">
      <style:text-properties officeooo:rsid="002cf06a"/>
    </style:style>
    <style:style style:name="T5" style:family="text">
      <style:text-properties style:font-name="Liberation Serif" officeooo:rsid="002cf06a" style:font-name-asian="Liberation Serif" style:font-name-complex="Liberation Serif"/>
    </style:style>
    <style:style style:name="T6" style:family="text">
      <style:text-properties style:font-name="Liberation Serif" officeooo:rsid="002f48ef" style:font-name-asian="Liberation Serif" style:font-name-complex="Liberation Serif"/>
    </style:style>
    <style:style style:name="T7" style:family="text">
      <style:text-properties officeooo:rsid="0043d019"/>
    </style:style>
    <style:style style:name="T8" style:family="text">
      <style:text-properties officeooo:rsid="00120412"/>
    </style:style>
    <style:style style:name="T9" style:family="text">
      <style:text-properties officeooo:rsid="00452b48"/>
    </style:style>
    <style:style style:name="T10" style:family="text">
      <style:text-properties officeooo:rsid="00480650"/>
    </style:style>
    <style:style style:name="T11" style:family="text">
      <style:text-properties style:font-name="Noto Sans Mono" fo:font-size="7pt" fo:font-weight="normal" style:font-size-asian="7pt" style:font-weight-asian="normal" style:font-size-complex="7pt" style:font-weight-complex="normal"/>
    </style:style>
    <style:style style:name="T12" style:family="text">
      <style:text-properties style:font-name="MathJax_SansSerif" fo:font-size="8pt" fo:font-style="italic" fo:font-weight="normal" style:font-size-asian="8pt" style:font-style-asian="italic" style:font-weight-asian="normal" style:font-size-complex="8pt" style:font-style-complex="italic" style:font-weight-complex="normal"/>
    </style:style>
    <style:style style:name="T13" style:family="text">
      <style:text-properties style:font-name="MathJax_SansSerif" fo:font-size="8pt" fo:font-style="italic" style:font-size-asian="8pt" style:font-style-asian="italic" style:font-size-complex="8pt"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7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178in" style:run-through="foreground"/>
      <style:paragraph-properties style:writing-mode="lr-tb"/>
    </style:style>
    <style:style style:name="gr5" style:family="graphic">
      <style:graphic-properties draw:stroke="none" svg:stroke-color="#000000" draw:fill="none" draw:fill-color="#ffffff" fo:min-height="0.25in" style:run-through="foreground"/>
      <style:paragraph-properties style:writing-mode="lr-tb"/>
    </style:style>
    <style:style style:name="gr6" style:family="graphic">
      <style:graphic-properties draw:stroke="none" svg:stroke-color="#000000" draw:fill="none" draw:fill-color="#ffffff" fo:min-height="0.2575in" style:run-through="foreground"/>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oof of the existence of perfect secrecy through all-way functions</text:p>
      <text:p text:style-name="P1">and computational difficulty through multi-way functions</text:p>
      <text:p text:style-name="P1"/>
      <text:p text:style-name="P1"/>
      <text:p text:style-name="P1"/>
      <text:p text:style-name="P3">Perfect secrecy through all-way functions</text:p>
      <text:p text:style-name="P2"/>
      <text:p text:style-name="P2"><draw:frame draw:style-name="fr1" draw:name="Object4" text:anchor-type="paragraph" svg:x="0.7402in" svg:y="0.0083in" svg:width="4.0909in" svg:height="0.9866in" draw:z-index="0"><draw:object xlink:href="./Object 1" xlink:type="simple" xlink:show="embed" xlink:actuate="onLoad"/><draw:image xlink:href="./ObjectReplacements/Object 1" xlink:type="simple" xlink:show="embed" xlink:actuate="onLoad"/><svg:desc>OLE object</svg:desc></draw:frame></text:p>
      <text:p text:style-name="P2"><draw:frame draw:style-name="fr1" draw:name="Object2" text:anchor-type="paragraph" svg:x="5.1445in" svg:y="0.0835in" svg:width="2.0173in" svg:height="1.5709in" draw:z-index="2"><draw:object xlink:href="./Object 2" xlink:type="simple" xlink:show="embed" xlink:actuate="onLoad"/><draw:image xlink:href="./ObjectReplacements/Object 2" xlink:type="simple" xlink:show="embed" xlink:actuate="onLoad"/><svg:desc>OLE object</svg:desc></draw:frame><draw:g text:anchor-type="paragraph" draw:z-index="1" draw:name="DrawObject1" draw:style-name="gr3"><draw:frame draw:name="Shape 4" draw:style-name="gr4" draw:text-style-name="P13" svg:width="0.3787in" svg:height="0.178in" svg:x="0.6394in" svg:y="0.0602in"><draw:text-box><text:p><text:span text:style-name="T12">key</text:span></text:p></draw:text-box></draw:frame><draw:frame draw:name="Shape 5" draw:style-name="gr5" draw:text-style-name="P14" svg:width="0.4697in" svg:height="0.2504in" svg:x="0.3984in" svg:y="0.315in"><draw:text-box><text:p><text:span text:style-name="T13">plaintext</text:span></text:p></draw:text-box></draw:frame><draw:frame draw:name="Shape 6" draw:style-name="gr6" draw:text-style-name="P14" svg:width="0.6016in" svg:height="0.2579in" svg:x="0.3402in" svg:y="0.5736in"><draw:text-box><text:p><text:span text:style-name="T13">ciphertext</text:span></text:p></draw:text-box></draw:frame></draw:g></text:p>
      <text:p text:style-name="P2"/>
      <text:p text:style-name="P2"/>
      <text:p text:style-name="P2"/>
      <text:p text:style-name="P2"/>
      <text:p text:style-name="P2"/>
      <text:p text:style-name="P2"/>
      <text:p text:style-name="P2"><draw:custom-shape text:anchor-type="paragraph" draw:z-index="3" draw:name="Shape10" draw:style-name="gr2" draw:text-style-name="P12" svg:width="0.1287in" svg:height="0.1594in" svg:x="0.8693in" svg:y="0.0571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frame text:anchor-type="paragraph" draw:z-index="4" draw:name="Text Frame 1" draw:style-name="gr1" draw:text-style-name="P11" svg:width="4.5614in" svg:height="0.7969in" svg:x="0.2854in" svg:y="0.0429in"><draw:text-box><text:p text:style-name="P10"><text:span text:style-name="T11">(5+7) </text:span><text:span text:style-name="T11">mod 10 </text:span><text:span text:style-name="T11">= 2. </text:span><text:span text:style-name="T11">The </text:span><text:span text:style-name="T11">full </text:span><text:span text:style-name="T11">10-</text:span><text:span text:style-name="T11">symbol </text:span><text:span text:style-name="T11">mod </text:span><text:span text:style-name="T11">table </text:span><text:span text:style-name="T11">on the </text:span><text:span text:style-name="T11">right </text:span><text:span text:style-name="T11">proves </text:span><text:span text:style-name="T11">the </text:span><text:span text:style-name="T11">plainte</text:span><text:span text:style-name="T11">xt </text:span><text:span text:style-name="T11">could </text:span><text:span text:style-name="T11">be any </text:span><text:span text:style-name="T11">of 10 </text:span><text:span text:style-name="T11">digits </text:span><text:span text:style-name="T11">(2 </text:span><text:span text:style-name="T11">appears </text:span><text:span text:style-name="T11">10 </text:span><text:span text:style-name="T11">times </text:span><text:span text:style-name="T11">on the </text:span><text:span text:style-name="T11">table.) </text:span><text:span text:style-name="T11">No </text:span><text:span text:style-name="T11">guess-</text:span><text:span text:style-name="T11">key is </text:span><text:span text:style-name="T11">rejecte</text:span><text:span text:style-name="T11">d; </text:span><text:span text:style-name="T11">complet</text:span><text:span text:style-name="T11">e </text:span><text:span text:style-name="T11">brute-</text:span><text:span text:style-name="T11">force </text:span><text:span text:style-name="T11">cannot </text:span><text:span text:style-name="T11">determi</text:span><text:span text:style-name="T11">ne </text:span><text:span text:style-name="T11">usefuln</text:span><text:span text:style-name="T11">ess of </text:span><text:span text:style-name="T11">any key </text:span><text:span text:style-name="T11">tried. </text:span><text:span text:style-name="T11">Only </text:span><text:span text:style-name="T11">key </text:span><text:span text:style-name="T11">owners </text:span><text:span text:style-name="T11">know </text:span><text:span text:style-name="T11">that </text:span><text:span text:style-name="T11">“7” was </text:span><text:span text:style-name="T11">intende</text:span><text:span text:style-name="T11">d. This </text:span><text:span text:style-name="T11">works </text:span><text:span text:style-name="T11">for </text:span><text:span text:style-name="T11">files. </text:span><text:span text:style-name="T11">(key_by</text:span><text:span text:style-name="T11">te + </text:span><text:span text:style-name="T11">plainte</text:span><text:span text:style-name="T11">xt_byte</text:span><text:span text:style-name="T11">) mod </text:span><text:span text:style-name="T11">256 <text:s/>= <text:s/></text:span><text:span text:style-name="T11">1 of </text:span><text:span text:style-name="T11">256 </text:span><text:span text:style-name="T11">differe</text:span><text:span text:style-name="T11">nt </text:span><text:span text:style-name="T11">values <text:s/></text:span><text:span text:style-name="T11">(0 to </text:span><text:span text:style-name="T11">255.)</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Computational difficulty</text:span> through <text:span text:style-name="T1">multi</text:span>-way functions</text:p>
      <text:p text:style-name="P4"/>
      <text:p text:style-name="P5"><text:s text:c="8"/>So far, perfect secrecy has been shown to exist for all-way functions where privately shared keys are used only once and demolished effectively. <text:span text:style-name="T2">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5"><text:s text:c="8"/><text:span text:style-name="T3">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5"><text:s text:c="8"/><text:span text:style-name="T4">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5">≠</text:span><text:span text:style-name="T6">NP.</text:span></text:p>
      <text:p text:style-name="P6"/>
      <text:p text:style-name="P6"/>
      <text:p text:style-name="P6"/>
      <text:p text:style-name="P7"/>
      <text:p text:style-name="P8"><text:span text:style-name="T8">Nikolay Valentinovich Repnitskiy - </text:span>February 21 2020</text:p>
      <text:p text:style-name="P9">Original discoverer of the O<text:span text:style-name="T7">ne-time pad </text:span><text:span text:style-name="T9">(perfect <text:s/>secrecy) </text:span>is not mentioned <text:span text:style-name="T10">as</text:span> I had independently rediscovered it ~December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Extra Bold" svg:font-family="'Cantarell Extra Bold'"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MathJax_Math" svg:font-family="MathJax_Math" style:font-pitch="variable"/>
    <style:font-face style:name="MathJax_SansSerif" svg:font-family="MathJax_SansSerif" style:font-family-generic="swiss" style:font-pitch="variable"/>
    <style:font-face style:name="Noto Sans Mono" svg:font-family="'Noto Sans Mono'" style:font-family-generic="swiss" style:font-pitch="fixed"/>
    <style:font-face style:name="Noto Sans Mono1" svg:font-family="'Noto Sans Mon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4T16:54:05.567733862</meta:creation-date>
    <dc:date>2025-02-10T20:24:43.076194737</dc:date>
    <meta:editing-duration>PT2H35M39S</meta:editing-duration>
    <meta:editing-cycles>58</meta:editing-cycles>
    <meta:generator>LibreOffice/7.4.7.2$Linux_X86_64 LibreOffice_project/40$Build-2</meta:generator>
    <meta:document-statistic meta:table-count="0" meta:image-count="0" meta:object-count="2" meta:page-count="1" meta:paragraph-count="9" meta:word-count="304" meta:character-count="2074" meta:non-whitespace-character-count="1755"/>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Extra Bold" svg:font-family="'Cantarell Extra 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erif Display" svg:font-family="'Noto Serif Display'" style:font-adornments="Bold" style:font-family-generic="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709in"/>
    </style:style>
    <style:style style:name="ro1" style:family="table-row">
      <style:table-row-properties style:row-height="0.178in" fo:break-before="auto" style:use-optimal-row-height="false"/>
    </style:style>
    <style:style style:name="ro2" style:family="table-row">
      <style:table-row-properties style:row-height="0.5646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ackground-color="transparent" style:vertical-align="middle"/>
      <style:paragraph-properties fo:text-align="center" fo:margin-left="0in"/>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Extra Bold" svg:font-family="'Cantarell Extra 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erif Display" svg:font-family="'Noto Serif Display'" style:font-adornments="Bold"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Extra Bold" svg:font-family="'Cantarell Extra 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erif Display" svg:font-family="'Noto Serif Display'" style:font-adornments="Bold" style:font-family-generic="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709in"/>
    </style:style>
    <style:style style:name="ro1" style:family="table-row">
      <style:table-row-properties style:row-height="0.178in" fo:break-before="auto" style:use-optimal-row-height="false"/>
    </style:style>
    <style:style style:name="ro2" style:family="table-row">
      <style:table-row-properties style:row-height="0.5646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in"/>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1"/>
        <table:table-column table:style-name="co2" table:number-columns-repeated="10" table:default-cell-style-name="ce3"/>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Extra Bold" svg:font-family="'Cantarell Extra 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erif Display" svg:font-family="'Noto Serif Display'" style:font-adornments="Bold"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